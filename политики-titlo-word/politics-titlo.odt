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Таблица1" style:family="table">
      <style:table-properties style:width="6.6951in" fo:margin-left="0in" table:align="left"/>
    </style:style>
    <style:style style:name="Таблица1.A" style:family="table-column">
      <style:table-column-properties style:column-width="3.3472in"/>
    </style:style>
    <style:style style:name="Таблица1.B" style:family="table-column">
      <style:table-column-properties style:column-width="3.3479in"/>
    </style:style>
    <style:style style:name="Таблица1.A1" style:family="table-cell">
      <style:table-cell-properties fo:padding="0.0201in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="0.0201in" fo:border="0.25pt solid #000000" style:writing-mode="lr-tb"/>
    </style:style>
    <style:style style:name="Таблица1.A2" style:family="table-cell">
      <style:table-cell-properties fo:padding="0.0201in" fo:border-left="0.25pt solid #000000" fo:border-right="none" fo:border-top="none" fo:border-bottom="0.25pt solid #000000" style:writing-mode="lr-tb"/>
    </style:style>
    <style:style style:name="Таблица1.B2" style:family="table-cell">
      <style:table-cell-properties fo:padding="0.0201in" fo:border-left="0.25pt solid #000000" fo:border-right="0.25pt solid #000000" fo:border-top="none" fo:border-bottom="0.25pt solid #000000" style:writing-mode="lr-tb"/>
    </style:style>
    <style:style style:name="Таблица2" style:family="table">
      <style:table-properties style:width="6.6951in" fo:margin-left="0in" table:align="left"/>
    </style:style>
    <style:style style:name="Таблица2.A" style:family="table-column">
      <style:table-column-properties style:column-width="3.3472in"/>
    </style:style>
    <style:style style:name="Таблица2.B" style:family="table-column">
      <style:table-column-properties style:column-width="3.3479in"/>
    </style:style>
    <style:style style:name="Таблица2.A1" style:family="table-cell">
      <style:table-cell-properties fo:padding="0.0201in" fo:border-left="0.25pt solid #000000" fo:border-right="none" fo:border-top="0.25pt solid #000000" fo:border-bottom="0.25pt solid #000000" style:writing-mode="lr-tb"/>
    </style:style>
    <style:style style:name="Таблица2.B1" style:family="table-cell">
      <style:table-cell-properties fo:padding="0.0201in" fo:border="0.25pt solid #000000" style:writing-mode="lr-tb"/>
    </style:style>
    <style:style style:name="Таблица2.A2" style:family="table-cell">
      <style:table-cell-properties fo:padding="0.0201in" fo:border-left="0.25pt solid #000000" fo:border-right="none" fo:border-top="none" fo:border-bottom="0.25pt solid #000000" style:writing-mode="lr-tb"/>
    </style:style>
    <style:style style:name="Таблица2.B2" style:family="table-cell">
      <style:table-cell-properties fo:padding="0.0201in" fo:border-left="0.25pt solid #000000" fo:border-right="0.25pt solid #000000" fo:border-top="none" fo:border-bottom="0.25pt solid #000000" style:writing-mode="lr-tb"/>
    </style:style>
    <style:style style:name="Таблица3" style:family="table">
      <style:table-properties style:width="12.425in" fo:margin-left="0in" table:align="left"/>
    </style:style>
    <style:style style:name="Таблица3.A" style:family="table-column">
      <style:table-column-properties style:column-width="2.0701in"/>
    </style:style>
    <style:style style:name="Таблица3.B" style:family="table-column">
      <style:table-column-properties style:column-width="2.0708in"/>
    </style:style>
    <style:style style:name="Таблица3.F" style:family="table-column">
      <style:table-column-properties style:column-width="2.0715in"/>
    </style:style>
    <style:style style:name="Таблица3.A1" style:family="table-cell">
      <style:table-cell-properties fo:padding="0.0201in" fo:border-left="0.25pt solid #000000" fo:border-right="none" fo:border-top="0.25pt solid #000000" fo:border-bottom="0.25pt solid #000000" style:writing-mode="lr-tb"/>
    </style:style>
    <style:style style:name="Таблица3.F1" style:family="table-cell">
      <style:table-cell-properties fo:padding="0.0201in" fo:border="0.25pt solid #000000" style:writing-mode="lr-tb"/>
    </style:style>
    <style:style style:name="Таблица3.A2" style:family="table-cell">
      <style:table-cell-properties fo:padding="0.0201in" fo:border-left="0.25pt solid #000000" fo:border-right="none" fo:border-top="none" fo:border-bottom="0.25pt solid #000000" style:writing-mode="lr-tb"/>
    </style:style>
    <style:style style:name="Таблица3.F2" style:family="table-cell">
      <style:table-cell-properties fo:padding="0.0201in" fo:border-left="0.25pt solid #000000" fo:border-right="0.25pt solid #000000" fo:border-top="none" fo:border-bottom="0.25pt solid #000000" style:writing-mode="lr-tb"/>
    </style:style>
    <style:style style:name="Таблица3.4" style:family="table-row">
      <style:table-row-properties style:min-row-height="0.4201in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master-page-name="MP1">
      <style:paragraph-properties style:page-number="1" fo:break-before="page"/>
    </style:style>
    <style:style style:name="T1" style:family="text">
      <style:text-properties style:font-name="Helvetica" style:letter-kerning="false" style:font-name-complex="Helvetica" style:language-complex="ar" style:country-complex="SA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ПОЛИТИКА обработки персональных данных <text:span text:style-name="Основной_20_шрифт_20_абзаца"><text:span text:style-name="T1">ИП Виленская Юлия Андреевна</text:span></text:span></text:h>
      <text:p text:style-name="P1">Версия от 21.04.2026 г</text:p>
      <text:h text:style-name="P8" text:outline-level="2">1. Область применения</text:h>
      <text:p text:style-name="Text_20_body">1.1.1. Настоящая «Политика обработки персональных данных» (далее – Политика) определяет систему взглядов на обеспечение безопасности персональных данных в ИП Виленская Юлия Андреевна (далее - ИП) и представляет собой систематизированное изложение целей и задач защиты, основных принципов и способов обеспечения требуемого уровня безопасности информации, организационных и технологических аспектов обеспечения безопасности персональных данных в информационных системах персональных данных.</text:p>
      <text:p text:style-name="Text_20_body">1.1.2. Настоящая Политика определяет главные принципы, которыми руководствуется ИП при обработке персональных данных в процессе осуществления своей деятельности.</text:p>
      <text:p text:style-name="Text_20_body">1.1.3. Настоящая Политика разработана в соответствии с положениями действующих нормативно-правовых актов Российской Федерации, в том числе:</text:p>
      <text:list xml:id="list952652967" text:style-name="L1">
        <text:list-item>
          <text:p text:style-name="P9">Налогового кодекса Российской Федерации (часть первая от 31.07.1998 г. № 146-ФЗ и часть вторая от 05.08.2000 г. № 117-ФЗ);</text:p>
        </text:list-item>
        <text:list-item>
          <text:p text:style-name="P9">Федерального закона от 06.04.2011 № 63-ФЗ «Об электронной подписи»;</text:p>
        </text:list-item>
        <text:list-item>
          <text:p text:style-name="P9">Федерального закона от 27.07.2006 № 152-ФЗ «О персональных данных»;</text:p>
        </text:list-item>
        <text:list-item>
          <text:p text:style-name="P9">Постановления Правительства Российской Федерации от 15.09.2008 № 687 «Об утверждении Положения об особенностях обработки персональных данных, осуществляемой без использования средств автоматизации»;</text:p>
        </text:list-item>
        <text:list-item>
          <text:p text:style-name="P9">Постановления Правительства Российской Федерации от 01.11.2012 № 1119 «Об утверждении требований к защите персональных данных при их обработке в информационных системах персональных данных»;</text:p>
        </text:list-item>
        <text:list-item>
          <text:p text:style-name="P9">Приказа Росархива от 20.12.2019 № 236 «Об утверждении Перечня типовых управленческих архивных документов, образующихся в процессе деятельности государственных органов, органов местного самоуправления и организаций, с указанием сроков их хранения»;</text:p>
        </text:list-item>
        <text:list-item>
          <text:p text:style-name="P9">Приказа ФСТЭК России от 18.02.2013 № 21 «Об утверждении Состава и содержания организационных и технических мер по обеспечению безопасности персональных данных при их обработке в информационных системах персональных данных»;</text:p>
        </text:list-item>
        <text:list-item>
          <text:p text:style-name="P9">Положения о защите персональных данных ИП Виленская Юлия Андреевна.</text:p>
        </text:list-item>
      </text:list>
      <text:p text:style-name="Text_20_body">1.1.4. Целью настоящей Политики является формирование и проведение единой политики в области обеспечения безопасности персональных данных.</text:p>
      <text:p text:style-name="Text_20_body">1.1.5. Действие настоящей Политики распространяется на все процессы ИП, связанные с обработкой персональных данных. Политика обязательна для применения всеми работниками ИП.</text:p>
      <text:p text:style-name="Text_20_body"><text:soft-page-break/>1.1.6. Внутренние документы ИП, затрагивающие вопросы, рассматриваемые в настоящей Политике, должны разрабатываться с учетом положений настоящей Политики и не противоречить им.</text:p>
      <text:p text:style-name="Text_20_body">1.1.7. На основании приказа Федеральной службы по надзору в сфере связи, информационных технологий и массовых коммуникаций ИП включено в реестр операторов, осуществляющих обработку персональных данных.</text:p>
      <text:p text:style-name="Text_20_body">1.1.8. Ответственным за актуализацию документа является работник ИП, который назначен приказом Генерального директора ИП ответственным лицом за организацию обработки персональных данных в ИП.</text:p>
      <text:p text:style-name="Text_20_body">1.1.9. Настоящая Политика размещена в открытом неограниченном доступе на официальном интернет-сайте ИП (<text:a xlink:type="simple" xlink:href="https://titlo.ru/" text:style-name="Internet_20_link" text:visited-style-name="Visited_20_Internet_20_Link">https://titlo.ru/</text:a>).</text:p>
      <text:h text:style-name="Heading_20_2" text:outline-level="2">1.2 Термины и определения</text:h>
      <text:p text:style-name="Text_20_body">Ниже приводится список терминов и определений, принятых в рамках данного документ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Термин</text:p>
          </table:table-cell>
          <table:table-cell table:style-name="Таблица1.B1" office:value-type="string">
            <text:p text:style-name="P4">Определение</text:p>
          </table:table-cell>
        </table:table-row>
        <table:table-row>
          <table:table-cell table:style-name="Таблица1.A2" office:value-type="string">
            <text:p text:style-name="P5">Автоматизированная обработка персональных данных</text:p>
          </table:table-cell>
          <table:table-cell table:style-name="Таблица1.B2" office:value-type="string">
            <text:p text:style-name="Table_20_Contents">Обработка персональных данных с помощью средств вычислительной техники.</text:p>
          </table:table-cell>
        </table:table-row>
        <table:table-row>
          <table:table-cell table:style-name="Таблица1.A2" office:value-type="string">
            <text:p text:style-name="P5">Блокирование персональных данных</text:p>
          </table:table-cell>
          <table:table-cell table:style-name="Таблица1.B2" office:value-type="string">
            <text:p text:style-name="Table_20_Contents">Временное прекращение обработки персональных данных (за исключением случаев, если обработка необходима для уточнения персональных данных).</text:p>
          </table:table-cell>
        </table:table-row>
        <table:table-row>
          <table:table-cell table:style-name="Таблица1.A2" office:value-type="string">
            <text:p text:style-name="P5">Информационная система персональных данных</text:p>
          </table:table-cell>
          <table:table-cell table:style-name="Таблица1.B2" office:value-type="string">
            <text:p text:style-name="Table_20_Contents">Совокупность содержащихся в базах данных персональных данных и обеспечивающих их обработку информационных технологий и технических средств.</text:p>
          </table:table-cell>
        </table:table-row>
        <table:table-row>
          <table:table-cell table:style-name="Таблица1.A2" office:value-type="string">
            <text:p text:style-name="P5">Обезличивание персональных данных</text:p>
          </table:table-cell>
          <table:table-cell table:style-name="Таблица1.B2" office:value-type="string">
            <text:p text:style-name="Table_20_Contents">Действия, в результате которых становится невозможным без использования дополнительной информации определить принадлежность персональных данных конкретному субъекту персональных данных.</text:p>
          </table:table-cell>
        </table:table-row>
        <table:table-row>
          <table:table-cell table:style-name="Таблица1.A2" office:value-type="string">
            <text:p text:style-name="P5">Обработка персональных данных</text:p>
          </table:table-cell>
          <table:table-cell table:style-name="Таблица1.B2" office:value-type="string">
            <text:p text:style-name="Table_20_Contents">Любое действие (операция) или совокупность действий (операций), совершаемых с использованием средств автоматизации или без использования таких средств с персональными данными, включая сбор, запись, систематизацию, накопление, хранение, уточнение (обновление, изменение), извлечение, использование, передачу (распространение, предоставление, доступ), обезличивание, блокирование, удаление, уничтожение персональных данных.</text:p>
          </table:table-cell>
        </table:table-row>
        <table:table-row>
          <table:table-cell table:style-name="Таблица1.A2" office:value-type="string">
            <text:p text:style-name="P5">Оператор</text:p>
          </table:table-cell>
          <table:table-cell table:style-name="Таблица1.B2" office:value-type="string">
            <text:p text:style-name="Table_20_Contents">Государственный орган, муниципальный орган, юридическое или физическое лицо, самостоятельно или совместно с другими лицами организующие и (или) осуществляющее обработку персональных данных, а также определяющие цели <text:soft-page-break/>обработки персональных данных, состав персональных данных, подлежащих обработке, действия (операции), совершаемые с персональными данными.</text:p>
          </table:table-cell>
        </table:table-row>
        <table:table-row>
          <table:table-cell table:style-name="Таблица1.A2" office:value-type="string">
            <text:p text:style-name="P5">Персональные данные</text:p>
          </table:table-cell>
          <table:table-cell table:style-name="Таблица1.B2" office:value-type="string">
            <text:p text:style-name="Table_20_Contents">Любая информация, относящаяся к прямо или косвенно определенному или определяемому физическому лицу (субъекту персональных данных).</text:p>
          </table:table-cell>
        </table:table-row>
        <table:table-row>
          <table:table-cell table:style-name="Таблица1.A2" office:value-type="string">
            <text:p text:style-name="P5">Предоставление персональных данных</text:p>
          </table:table-cell>
          <table:table-cell table:style-name="Таблица1.B2" office:value-type="string">
            <text:p text:style-name="Table_20_Contents">Действия, направленные на раскрытие персональных данных определенному лицу или определенному кругу лиц.</text:p>
          </table:table-cell>
        </table:table-row>
        <table:table-row>
          <table:table-cell table:style-name="Таблица1.A2" office:value-type="string">
            <text:p text:style-name="P5">Распространение персональных данных</text:p>
          </table:table-cell>
          <table:table-cell table:style-name="Таблица1.B2" office:value-type="string">
            <text:p text:style-name="Table_20_Contents">Действия, направленные на раскрытие персональных данных неопределенному кругу лиц.</text:p>
          </table:table-cell>
        </table:table-row>
        <table:table-row>
          <table:table-cell table:style-name="Таблица1.A2" office:value-type="string">
            <text:p text:style-name="P5">Трансграничная передача персональных данных</text:p>
          </table:table-cell>
          <table:table-cell table:style-name="Таблица1.B2" office:value-type="string">
            <text:p text:style-name="Table_20_Contents">Передача персональных данных на территорию иностранного государства органу власти иностранного государства, иностранному физическому лицу или иностранному юридическому лицу.</text:p>
          </table:table-cell>
        </table:table-row>
        <table:table-row>
          <table:table-cell table:style-name="Таблица1.A2" office:value-type="string">
            <text:p text:style-name="P5">Уничтожение персональных данных</text:p>
          </table:table-cell>
          <table:table-cell table:style-name="Таблица1.B2" office:value-type="string">
            <text:p text:style-name="Table_20_Contents">Действия, в результате которых становится невозможным восстановить содержание персональных данных в информационной системе персональных данных и (или) в результате которых уничтожаются материальные носители персональных данных.</text:p>
          </table:table-cell>
        </table:table-row>
      </table:table>
      <text:h text:style-name="Heading_20_2" text:outline-level="2">1.3 Сокращения</text:h>
      <text:p text:style-name="Text_20_body">В данном документе используются следующие сокраще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">Сокращение</text:p>
          </table:table-cell>
          <table:table-cell table:style-name="Таблица2.B1" office:value-type="string">
            <text:p text:style-name="P4">Расшифровка сокращения</text:p>
          </table:table-cell>
        </table:table-row>
        <table:table-row>
          <table:table-cell table:style-name="Таблица2.A2" office:value-type="string">
            <text:p text:style-name="P5">ИП</text:p>
          </table:table-cell>
          <table:table-cell table:style-name="Таблица2.B2" office:value-type="string">
            <text:p text:style-name="Table_20_Contents">ИП Виленская Юлия Андреевна</text:p>
          </table:table-cell>
        </table:table-row>
        <table:table-row>
          <table:table-cell table:style-name="Таблица2.A2" office:value-type="string">
            <text:p text:style-name="P5">ПДн</text:p>
          </table:table-cell>
          <table:table-cell table:style-name="Таблица2.B2" office:value-type="string">
            <text:p text:style-name="Table_20_Contents">Персональные данные</text:p>
          </table:table-cell>
        </table:table-row>
        <table:table-row>
          <table:table-cell table:style-name="Таблица2.A2" office:value-type="string">
            <text:p text:style-name="P5">ИСПДн</text:p>
          </table:table-cell>
          <table:table-cell table:style-name="Таблица2.B2" office:value-type="string">
            <text:p text:style-name="Table_20_Contents">Информационная система персональных данных</text:p>
          </table:table-cell>
        </table:table-row>
        <table:table-row>
          <table:table-cell table:style-name="Таблица2.A2" office:value-type="string">
            <text:p text:style-name="P5">Политика</text:p>
          </table:table-cell>
          <table:table-cell table:style-name="Таблица2.B2" office:value-type="string">
            <text:p text:style-name="Table_20_Contents">Политика обработки персональных данных ИП Виленская Юлия Андреевна – настоящий документ</text:p>
          </table:table-cell>
        </table:table-row>
        <table:table-row>
          <table:table-cell table:style-name="Таблица2.A2" office:value-type="string">
            <text:p text:style-name="P5">Роскомнадзор</text:p>
          </table:table-cell>
          <table:table-cell table:style-name="Таблица2.B2" office:value-type="string">
            <text:p text:style-name="Table_20_Contents">Уполномоченный орган по защите прав субъектов ПДн</text:p>
          </table:table-cell>
        </table:table-row>
        <table:table-row>
          <table:table-cell table:style-name="Таблица2.A2" office:value-type="string">
            <text:p text:style-name="P5">ФЗ «О персональных данных»</text:p>
          </table:table-cell>
          <table:table-cell table:style-name="Таблица2.B2" office:value-type="string">
            <text:p text:style-name="Table_20_Contents">Федеральный закон от 27.07.2006 №152-ФЗ «О персональных данных»</text:p>
          </table:table-cell>
        </table:table-row>
        <table:table-row>
          <table:table-cell table:style-name="Таблица2.A2" office:value-type="string">
            <text:p text:style-name="P5">Роскомнадзор</text:p>
          </table:table-cell>
          <table:table-cell table:style-name="Таблица2.B2" office:value-type="string">
            <text:p text:style-name="Table_20_Contents">Федеральная служба по надзору в сфере связи, информационных технологий и массовых коммуникаций</text:p>
          </table:table-cell>
        </table:table-row>
      </table:table>
      <text:p text:style-name="Text_20_body"/>
      <text:h text:style-name="P8" text:outline-level="2">2. ОСНОВНЫЕ ПОЛОЖЕНИЯ</text:h>
      <text:p text:style-name="P2">2.1. Принципы обработки персональных данных</text:p>
      <text:p text:style-name="Text_20_body">2.1.1. Обработка ПДн в ИП осуществляется на основании следующих принципов:</text:p>
      <text:list xml:id="list3761618665" text:style-name="L2">
        <text:list-item>
          <text:p text:style-name="P10"><text:soft-page-break/>законности и справедливости целей и способов обработки ПДн;</text:p>
        </text:list-item>
        <text:list-item>
          <text:p text:style-name="P10">соответствия целей обработки ПДн законным целям, заранее определенным и заявленным при сборе ПДн, а также полномочиям ИП;</text:p>
        </text:list-item>
        <text:list-item>
          <text:p text:style-name="P10">соответствия объема и содержания обрабатываемых ПДн, способов обработки ПДн целям обработки ПДн;</text:p>
        </text:list-item>
        <text:list-item>
          <text:p text:style-name="P10">точности ПДн, их достаточности для целей обработки, недопустимости обработки ПДн, избыточных по отношению к целям, заявленным при сборе ПДн;</text:p>
        </text:list-item>
        <text:list-item>
          <text:p text:style-name="P10">недопустимости объединения созданных для несовместимых между собой целей баз данных, содержащих ПДн;</text:p>
        </text:list-item>
        <text:list-item>
          <text:p text:style-name="P10">хранения ПДн в форме, позволяющей определить субъекта ПДн, не дольше, чем этого требуют цели обработки ПДн, или устанавливающий срок хранения федеральный закон, договор, стороной которого, выгодоприобретателем или поручителем, по которому является субъект ПДн;</text:p>
        </text:list-item>
        <text:list-item>
          <text:p text:style-name="P10">уничтожения или обезличивания ПДн по достижении целей их обработки, в случае утраты необходимости в достижении целей обработки или по окончании срока хранения ПДн, установленного федеральным законом, договором, стороной которого, выгодоприобретателем или поручителем, по которому является субъект ПДн;</text:p>
        </text:list-item>
        <text:list-item>
          <text:p text:style-name="P10">обеспечения конфиденциальности и безопасности обрабатываемых персональных данных.</text:p>
        </text:list-item>
      </text:list>
      <text:p text:style-name="P2">2.2. Цели обработки персональных данных, категории и перечень обрабатываемых персональных данных, категории субъектов, персональные данные которых обрабатываются</text:p>
      <text:p text:style-name="Text_20_body">2.2.1. Обработка персональных данных субъектов ПДн осуществляется в заранее определенных целях. Для каждой цели обработки персональных данных в ИП определены:</text:p>
      <text:p text:style-name="Text_20_body">2.2.2. соответствующие категории и перечень обрабатываемых персональных данных;</text:p>
      <text:p text:style-name="Text_20_body">2.2.3. категории субъектов ПДн, персональные данные которых обрабатываются ИП;</text:p>
      <text:p text:style-name="Text_20_body">2.2.4. способы и сроки обработки и хранения персональных данных;</text:p>
      <text:p text:style-name="Text_20_body">2.2.5. порядок уничтожения персональных данных.</text:p>
      <text:p text:style-name="Text_20_body">2.2.6. Цели обработки персональных данных и соответствующие им категории и перечень обрабатываемых персональных данных, категории субъектов ПДн приведены в <text:span text:style-name="Основной_20_шрифт_20_абзаца"><text:span text:style-name="T2">Приложении № 1 к настоящей Политике</text:span></text:span>, являющемся ее неотъемлемой частью.</text:p>
      <text:p text:style-name="Text_20_body">2.2.7. ИП не осуществляет обработку специальных категорий ПДн, касающихся расовой и национальной принадлежности, политических взглядов, религиозных и философских убеждений, интимной жизни, судимости физических лиц, если иное не установлено законодательством Российской Федерации.</text:p>
      <text:p text:style-name="P2">2.3. Согласие на обработку персональных данных</text:p>
      <text:p text:style-name="Text_20_body">2.3.1. Обработка ПДн осуществляется ИП с согласия субъекта ПДн либо без его согласия, в случаях, предусмотренных действующим законодательством РФ.</text:p>
      <text:p text:style-name="Text_20_body"><text:soft-page-break/>2.3.2. Согласие на обработку ПДн может быть дано субъектом ПДн или его представителем в любой позволяющей подтвердить факт его получения форме, если иное не установлено федеральным законом. В случае получения согласия на обработку ПДн от представителя субъекта ПДн полномочия данного представителя на дачу согласия от имени субъекта ПДн проверяются ИП.</text:p>
      <text:p text:style-name="Text_20_body">2.3.3. Письменное согласие субъекта ПДн должно включать:</text:p>
      <text:list xml:id="list1652690671" text:style-name="L3">
        <text:list-item>
          <text:p text:style-name="P11">фамилию, имя, отчество, адрес субъекта ПДн/представителя субъекта ПДн, номер основного документа, удостоверяющего его личность, сведения о дате выдачи указанного документа и выдавшем его органе, реквизиты доверенности или иного документа, подтверждающего полномочия этого представителя (при получении согласия от представителя субъекта персональных данных);</text:p>
        </text:list-item>
        <text:list-item>
          <text:p text:style-name="P11">наименование и адрес ИП;</text:p>
        </text:list-item>
        <text:list-item>
          <text:p text:style-name="P11">наименование или фамилию, имя, отчество и адрес лица, осуществляющего обработку ПДн по поручению ИП, если обработка будет поручена такому лицу;</text:p>
        </text:list-item>
        <text:list-item>
          <text:p text:style-name="P11">цель обработки ПДн;</text:p>
        </text:list-item>
        <text:list-item>
          <text:p text:style-name="P11">перечень ПДн, на обработку которых дается согласие субъекта ПДн;</text:p>
        </text:list-item>
        <text:list-item>
          <text:p text:style-name="P11">перечень действий с ПДн, на совершение которых дается согласие, общее описание используемых ИП способов обработки ПДн;</text:p>
        </text:list-item>
        <text:list-item>
          <text:p text:style-name="P11">срок, в течение которого действует согласие, а также порядок его отзыва;</text:p>
        </text:list-item>
        <text:list-item>
          <text:p text:style-name="P11">подпись субъекта ПДн.</text:p>
        </text:list-item>
      </text:list>
      <text:p text:style-name="Text_20_body">2.3.4. Согласие на обработку ПДн принимается Субъектом ПДн путем установки флагов/переключателей/нажатия кнопок в чек-боксах, ввода кодов, паролей на экранных веб-формах. Согласие на обработку ПДн в случае требования действующего законодательства РФ подписывается собственноручной подписью на бумажном носителе либо электронной подписью на электронном носителе в соответствии с Федеральным законом от 06.04.2011 № 63-ФЗ «Об электронной подписи».</text:p>
      <text:p text:style-name="Text_20_body">2.3.5. Согласие на обработку ПДн может быть отозвано субъектом ПДн путем направления в ИП заявления, подписанного собственноручной подписью на бумажном носителе либо подписанного электронной подписью, приравненной к собственноручной подписи, в соответствии с Федеральным законом от 06.04.2011 № 63-ФЗ «Об электронной подписи» в электронном виде.</text:p>
      <text:p text:style-name="Text_20_body">2.3.6. Заявление должно содержать информацию, необходимую для идентификации заявителя в качестве клиента ИП.</text:p>
      <text:p text:style-name="Text_20_body">2.3.7. В этом случае ИП обязуется прекратить обработку, а также уничтожить все имеющиеся в ИП ПДн в сроки, установленные ФЗ «О персональных данных». ИП вправе обрабатывать ПДн без согласия субъекта ПДн (или при отзыве субъектом ПДн указанного согласия) при наличии оснований, указанных в ФЗ «О персональных данных».</text:p>
      <text:p text:style-name="Text_20_body">2.3.8. Отзыв согласия на обработку персональных данных может быть направлен по следующим адресам:</text:p>
      <text:p text:style-name="Text_20_body"><text:soft-page-break/>электронная почта: <text:a xlink:type="simple" xlink:href="mailto:info@titlo.ru" text:style-name="Internet_20_link" text:visited-style-name="Visited_20_Internet_20_Link">info@titlo.ru</text:a>;</text:p>
      <text:p text:style-name="Text_20_body">почтовый адрес: 394026, Воронежская область, г. Воронеж, Московский проспект д.</text:p>
      <text:p text:style-name="Text_20_body">13/2 офис 175.</text:p>
      <text:p text:style-name="P2">2.4. Поручение на обработку персональных данных</text:p>
      <text:p text:style-name="Text_20_body">2.4.1. ИП вправе поручить обработку ПДн другому лицу с согласия субъекта ПДн, если иное не предусмотрено федеральным законом, на основании заключаемого с этой стороной договора (поручения на обработку ПДн).</text:p>
      <text:p text:style-name="Text_20_body">2.4.2. В поручении ИП должны быть определены перечень действий (операций) с ПДн, которые будут совершаться лицом, осуществляющим обработку ПДн, и цели обработки, должна быть установлена обязанность такого лица соблюдать конфиденциальность ПДн и обеспечивать безопасность ПДн при их обработке, а также должны быть указаны требования к защите обрабатываемых ПДн в соответствии с ФЗ «О персональных данных».</text:p>
      <text:p text:style-name="P2">2.5. Способы обработки</text:p>
      <text:p text:style-name="Text_20_body">2.5.1. Обработка ПДн ИП осуществляется путем сбора, записи, систематизации, накопления, хранения, уточнения (обновление, изменение), извлечения, использования, передачи (распространение, предоставление, доступ), обезличивания, блокирования, удаления, уничтожения.</text:p>
      <text:p text:style-name="Text_20_body">2.5.2. ИП осуществляет обработку персональных данных следующими способами:</text:p>
      <text:p text:style-name="Text_20_body">2.5.2.1. автоматизированная обработка (производится при помощи средств вычислительной техники);</text:p>
      <text:p text:style-name="Text_20_body">2.5.2.2. неавтоматизированная обработка (производится без участия средств вычислительной техники);</text:p>
      <text:p text:style-name="Text_20_body">2.5.2.3. смешанная обработка (производится как при помощи средств вычислительной техники, так и без них).</text:p>
      <text:p text:style-name="Text_20_body">2.5.3. Запрещается принятие на основании исключительно автоматизированной обработки персональных данных решений, порождающих юридические последствия в отношении субъекта персональных данных или иным образом затрагивающих его права и законные интересы, за исключением случаев, предусмотренных настоящей Политикой.</text:p>
      <text:p text:style-name="Text_20_body">2.5.4. Решение, порождающее юридические последствия в отношении субъекта персональных данных или иным образом затрагивающее его права и законные интересы, может быть принято на основании исключительно автоматизированной обработки его персональных данных только при наличии согласия в письменной форме субъекта персональных данных или в случаях, предусмотренных федеральными законами, устанавливающими также меры по обеспечению соблюдения прав и законных интересов субъекта персональных данных.</text:p>
      <text:p text:style-name="Text_20_body">2.5.5. В случае необходимости осуществления трансграничной передачи персональных данных ИП, перед совершением такой передачи, обязано убедиться в том, что иностранным государством, на территорию которого осуществляется передача персональных данных, обеспечивается адекватная защита прав субъектов персональных данных, а также в отсутствии установленных законодательством запретов или ограничений на передачу персональных данных на территорию данного иностранного государства.</text:p>
      <text:p text:style-name="Text_20_body"><text:soft-page-break/>2.5.6. Трансграничная передача персональных данных на территорию иностранных государств, не обеспечивающих адекватной защиты прав субъектов персональных данных, может осуществляться ИП в случаях:</text:p>
      <text:p text:style-name="Text_20_body"><text:s text:c="4"/>• наличия согласия в письменной форме субъекта персональных данных;</text:p>
      <text:p text:style-name="Text_20_body"><text:s text:c="4"/>• исполнения договора, стороной которого является субъект персональных данных;</text:p>
      <text:p text:style-name="Text_20_body"><text:s text:c="4"/>• в иных случаях, установленных законодательством РФ.</text:p>
      <text:p text:style-name="Text_20_body"/>
      <text:p text:style-name="P2">2.6. Период обработки и хранения персональных данных</text:p>
      <text:p text:style-name="Text_20_body">2.6.1. Сроки обработки указанных выше ПДн определяются в соответствии со сроком действия договора с субъектом ПДн, сроком исковой давности, Налоговым кодексом Российской Федерации, Приказом Министерства культуры Российской Федерации от 25.08.2010 №558 «Об утверждении "Перечня типовых управленческих архивных документов, образующихся в процессе деятельности государственных органов, органов местного самоуправления и организаций, с указанием сроков хранения"», а также иными требованиями законодательства Российской Федерации.</text:p>
      <text:p text:style-name="Text_20_body">2.6.2. Обработка ПДн начинается с момента поступления в ИП и прекращается:</text:p>
      <text:p text:style-name="Text_20_body">2.6.2.1. в случае выявления неправомерной обработки ПДн ИП или лицом, действующим по поручению ИП, ИП в срок, не превышающий десяти рабочих дней с даты такого выявления, обязано прекратить неправомерную обработку ПДн или обеспечить прекращение неправомерной обработки ПДн лицом, действующим по поручению ИП. В случае невозможности устранения допущенных нарушений ИП в срок, не превышающий десяти рабочих дней с даты выявления неправомерности действий с ПДн, уничтожает ПДн или обеспечивает их уничтожение. Об устранении допущенных нарушений или об уничтожении ПДн ИП уведомляет субъекта ПДн или его представителя, а в случае, если обращение или запрос были направлены Роскомнадзором - также этот орган;</text:p>
      <text:p text:style-name="Text_20_body">2.6.2.2. в случае достижения цели обработки ПДн ИП незамедлительно прекращает обработку ПДн и уничтожает соответствующие ПДн в срок, не превышающий тридцати рабочих дней с даты достижения цели обработки ПДн;</text:p>
      <text:p text:style-name="Text_20_body">2.6.2.3. в случае отзыва субъектом ПДн согласия на обработку своих ПДн ИП прекращает обработку ПДн и уничтожает (за исключением ПДн, которые хранятся в соответствии с действующим законодательством) ПДн в срок, не превышающий тридцати рабочих дней с даты поступления указанного отзыва. Об уничтожении ПДн ИП уведомляет субъекта ПДн.</text:p>
      <text:p text:style-name="Text_20_body">2.7. Уничтожение ПДн производится в случаях и в сроки, указанные выше, если иное не установлено действующим законодательством Российской Федерации.</text:p>
      <text:h text:style-name="P8" text:outline-level="2">3. ПРАВА СУБЪЕКТОВ ПЕРСОНАЛЬНЫХ ДАННЫХ</text:h>
      <text:p text:style-name="Text_20_body">3.1. Субъект ПДн имеет право на получение информации, касающейся обработки ИП его ПДн.</text:p>
      <text:p text:style-name="Text_20_body">3.2. Субъект ПДн вправе требовать от ИП уточнения его ПДн, их блокирования или уничтожения в случае, если ПДн являются неполными, устаревшими, неточными, незаконно полученными или не являются необходимыми для заявленной цели обработки, а также принимать предусмотренные законом меры по защите своих прав.</text:p>
      <text:p text:style-name="Text_20_body"><text:soft-page-break/>3.3. Право субъекта ПДн на доступ к его ПДн может быть ограничено в соответствии с федеральными законами Российской Федерации, в том числе если:</text:p>
      <text:list xml:id="list427247246" text:style-name="L4">
        <text:list-item>
          <text:p text:style-name="P12">обработка персональных данных осуществляется в соответствии с законодательством о противодействии легализации (отмыванию) доходов, полученных преступным путем, и финансированию терроризма;</text:p>
        </text:list-item>
        <text:list-item>
          <text:p text:style-name="P12">доступ субъекта персональных данных к его персональным данным нарушает права и законные интересы третьих лиц.</text:p>
        </text:list-item>
      </text:list>
      <text:p text:style-name="Text_20_body">3.4. Обработка персональных данных в целях продвижения товаров, работ, услуг на рынке путем осуществления прямых контактов с потенциальным потребителем с помощью средств связи допускается только при условии предварительного согласия субъекта ПДн.</text:p>
      <text:p text:style-name="Text_20_body">3.5. ИП принимает и обрабатывает запросы субъектов персональных данных и предоставляет сведения, подтверждающие факты обработки персональных данных, правовые основания, цели, сроки и способы обработки персональных данных, категории обрабатываемых персональных данных, свое наименование и местонахождение.</text:p>
      <text:h text:style-name="P8" text:outline-level="2">4. ОСНОВНЫЕ МЕРЫ ПО ОБЕСПЕЧЕНИЮ БЕЗОПАСНОСТИ ПДН</text:h>
      <text:p text:style-name="Text_20_body">4.1. В ИП принимаются следующие меры по обеспечению выполнения обязанностей, предусмотренных ФЗ «О персональных данных»:</text:p>
      <text:p text:style-name="Text_20_body">4.1.1. Назначение ответственных за организацию обработки и защиты ПДн;</text:p>
      <text:p text:style-name="Text_20_body">4.1.2. Издание ИП документов, определяющих политику ИП в отношении обработки ПДн, локальных актов по вопросам обработки ПДн, а также локальных актов, устанавливающих процедуры, направленные на предотвращение и выявление нарушений законодательства РФ, устранение последствий таких нарушений;</text:p>
      <text:p text:style-name="Text_20_body">4.1.3. Применение правовых, организационных и технических мер по обеспечению безопасности ПДн;</text:p>
      <text:p text:style-name="Text_20_body">4.1.4. Осуществление внутреннего контроля и аудита соответствия обработки ПДн требованиям законодательства РФ, настоящей Политике, иным локальным актам ИП;</text:p>
      <text:p text:style-name="Text_20_body">4.1.5. Оценка возможного вреда субъектам ПДн, причиненного в случае нарушения ФЗ «О персональных данных», соотношение указанного вреда и принимаемых ИП мер, направленных на обеспечение выполнения обязанностей, предусмотренных ФЗ «О персональных данных»;</text:p>
      <text:p text:style-name="Text_20_body">4.1.6. Ознакомление работников, непосредственно осуществляющих обработку ПДн, с положениями законодательства РФ о персональных данных, в том числе требованиями к защите ПДн, настоящей Политикой и иными локальными актами ИП по вопросам обработки персональных данных и (или) обучение указанных работников;</text:p>
      <text:p text:style-name="Text_20_body">4.1.7. Обеспечение обработки ПДн граждан Российской Федерации с использованием баз данных, находящихся на территории Российской Федерации, за исключением случаев, указанных в пункте 5 статьи 18 ФЗ «О персональных данных».</text:p>
      <text:h text:style-name="P8" text:outline-level="2"><text:soft-page-break/>5. ЗАКЛЮЧИТЕЛЬНЫЕ ПОЛОЖЕНИЯ</text:h>
      <text:p text:style-name="Text_20_body">5.1. По вопросам, касающимся применения настоящей Политики и процессов обработки персональных данных в ИП, заинтересованные лица могут обратиться по следующему адресу: <text:a xlink:type="simple" xlink:href="mailto:info@titlo.ru" text:style-name="Internet_20_link" text:visited-style-name="Visited_20_Internet_20_Link">info@titlo.ru</text:a></text:p>
      <text:p text:style-name="P13"/>
      <text:p text:style-name="P3">Приложение № 1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column table:style-name="Таблица3.F"/>
        <table:table-row>
          <table:table-cell table:style-name="Таблица3.A1" office:value-type="string">
            <text:p text:style-name="P6">Цель</text:p>
          </table:table-cell>
          <table:table-cell table:style-name="Таблица3.A1" office:value-type="string">
            <text:p text:style-name="P6">Категория Субъектов</text:p>
          </table:table-cell>
          <table:table-cell table:style-name="Таблица3.A1" office:value-type="string">
            <text:p text:style-name="P6">Категория ПДн</text:p>
          </table:table-cell>
          <table:table-cell table:style-name="Таблица3.A1" office:value-type="string">
            <text:p text:style-name="P6">Перечень ПДн</text:p>
          </table:table-cell>
          <table:table-cell table:style-name="Таблица3.A1" office:value-type="string">
            <text:p text:style-name="P6">Срок хранения</text:p>
          </table:table-cell>
          <table:table-cell table:style-name="Таблица3.F1" office:value-type="string">
            <text:p text:style-name="P6">Порядок уничтожения</text:p>
          </table:table-cell>
        </table:table-row>
        <table:table-row>
          <table:table-cell table:style-name="Таблица3.A2" office:value-type="string">
            <text:p text:style-name="P5">1. Включение соискателей в кадровый резерв ИП</text:p>
          </table:table-cell>
          <table:table-cell table:style-name="Таблица3.A2" office:value-type="string">
            <text:p text:style-name="Table_20_Contents">Соискатели вакантных должностей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ИО; фотография, номер телефона, адрес электронной почты; дата рождения; возраст; адрес (адрес регистрации по месту жительства/пребывания; гражданство; данные документов, удостоверяющих личность; ИНН; СНИЛС; сведения о работе, должности, сведения о трудовом стаже и трудовой деятельности; профессии); место рождения; сведения об образовании (в том числе квалификация, ученая степень/звание, образовательное учреждение, год обучения, специальность); пол; семейное положение; социальное положение; имущественное положение; пол; сведения о хобби, интересах, личности; сведения о статусе в качестве военнообязанного; сведения, содержащиеся в <text:soft-page-break/>документах воинского учета; сведенья о близких родственниках (ФИО, степень родства, номер телефона), сведения о привлечении к уголовной или административной ответственности (без запроса справки о судимости).</text:p>
          </table:table-cell>
          <table:table-cell table:style-name="Таблица3.A2" office:value-type="string">
            <text:p text:style-name="Table_20_Contents">5 лет со дня включения в кадровый резерв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уничтожаются путем удаления из информационных систем ИП с помощью встроенных средств информационной системы</text:p>
          </table:table-cell>
        </table:table-row>
        <table:table-row>
          <table:table-cell table:style-name="Таблица3.A2" table:number-rows-spanned="2" office:value-type="string">
            <text:p text:style-name="P5">2. Проведение проверки конфликта интересов</text:p>
          </table:table-cell>
          <table:table-cell table:style-name="Таблица3.A2" office:value-type="string">
            <text:p text:style-name="Table_20_Contents">Соискатели вакантных должностей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соответствии со ст. 10– 11 152-ФЗ и обрабатываются автоматизированным способом и без использования средств автоматизации.</text:p>
          </table:table-cell>
          <table:table-cell table:style-name="Таблица3.A2" office:value-type="string">
            <text:p text:style-name="Table_20_Contents">ФИО, фотография, номер телефона, адрес электронной почты; дата рождения; возраст; адрес (адрес регистрации по месту жительства/пребывания; гражданство; данные документов, удостоверяющих личность; ИНН; СНИЛС; сведения о работе, в том числе о месте работы, должности, сведения о трудовом стаже и трудовой деятельности; профессии); пол; сведенья о близких родственниках (ФИО, степень родства, номер телефона)</text:p>
          </table:table-cell>
          <table:table-cell table:style-name="Таблица3.A2" office:value-type="string">
            <text:p text:style-name="Table_20_Contents">До достижения цели обработки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уничтожаются путем удаления из информационных систем ИП с помощью встроенных средств информационной системы.</text:p>
          </table:table-cell>
        </table:table-row>
        <table:table-row table:style-name="Таблица3.4">
          <table:covered-table-cell/>
          <table:table-cell table:style-name="Таблица3.A2" office:value-type="string">
            <text:p text:style-name="Table_20_Contents">Работники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соответствии со ст. 10– 11 152-ФЗ и обрабатываются <text:soft-page-break/>автоматизированным способом и без использования средств автоматизации.</text:p>
          </table:table-cell>
          <table:table-cell table:style-name="Таблица3.A2" office:value-type="string">
            <text:p text:style-name="Table_20_Contents">ФИО, фотография, номер телефона, адрес электронной почты; дата рождения; возраст; адрес (адрес регистрации по <text:soft-page-break/>месту жительства/пребывания; гражданство; данные документов, удостоверяющих личность; ИНН; СНИЛС; сведения о работе, в том числе о месте работы, должности, сведения о трудовом стаже и трудовой деятельности; профессии); пол; сведенья о близких родственниках (ФИО, степень родства, номер телефона)</text:p>
          </table:table-cell>
          <table:table-cell table:style-name="Таблица3.A2" office:value-type="string">
            <text:p text:style-name="Table_20_Contents">До достижения цели обработки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уничтожаются путем удаления из <text:soft-page-break/>информационных систем ИП с помощью встроенных средств информационной системы. Персональные данные на бумажных носителях уничтожаются путем измельчения на мелкие части, исключающие возможность последующего восстановления информации. Измельчение осуществляется с использованием шредера (уничтожителя документов); Уничтожение персональных данных, содержащихся на машиночитаемых носителях, осуществляется путем нанесения им неустранимого физического повреждения, исключающего возможность их использования, а также восстановления данных. Вышеуказанное достигается путем деформирования, нарушения единой целостности носителя</text:p>
          </table:table-cell>
        </table:table-row>
        <table:table-row>
          <table:table-cell table:style-name="Таблица3.A2" table:number-rows-spanned="2" office:value-type="string">
            <text:p text:style-name="P5">3. Проведение проверочных мероприятий с целью <text:soft-page-break/>подтверждения профессиональных компетенций</text:p>
          </table:table-cell>
          <table:table-cell table:style-name="Таблица3.A2" office:value-type="string">
            <text:p text:style-name="Table_20_Contents">Соискатели вакантных должностей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<text:soft-page-break/>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ИО, фотография, номер телефона, адрес электронной почты; дата <text:soft-page-break/>рождения; возраст; адрес (адрес регистрации по месту жительства/пребывания; гражданство; данные документов, удостоверяющих личность; сведения о работе, в том числе о месте работы, должности, сведения о трудовом стаже и трудовой деятельности; профессии); сведения об образовании (в том числе квалификация, ученая степень/звание, образовательное учреждение, год обучения, специальность)</text:p>
          </table:table-cell>
          <table:table-cell table:style-name="Таблица3.A2" office:value-type="string">
            <text:p text:style-name="Table_20_Contents">До достижения цели обработки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<text:soft-page-break/>уничтожаются путем удаления из информационных систем ИП с помощью встроенных средств информационной системы. Персональные данные на бумажных носителях уничтожаются путем измельчения на мелкие части, исключающие возможность последующего восстановления информации. Измельчение осуществляется с использованием шредера (уничтожителя документов); Уничтожение персональных данных, содержащихся на машиночитаемых носителях, осуществляется путем нанесения им неустранимого физического повреждения, исключающего возможность их использования, а также восстановления данных. Вышеуказанное достигается путем деформирования, нарушения единой целостности носителя</text:p>
          </table:table-cell>
        </table:table-row>
        <table:table-row>
          <table:covered-table-cell/>
          <table:table-cell table:style-name="Таблица3.A2" office:value-type="string">
            <text:p text:style-name="Table_20_Contents">Работники</text:p>
          </table:table-cell>
          <table:table-cell table:style-name="Таблица3.A2" office:value-type="string">
            <text:p text:style-name="Table_20_Contents">Не относятся к <text:soft-page-break/>специальным категориям или биометрическим в 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ИО, фотография, номер <text:soft-page-break/>телефона, адрес электронной почты; дата рождения; возраст; адрес (адрес регистрации по месту жительства/пребывания; гражданство; данные документов, удостоверяющих личность; сведения о работе, в том числе о месте работы, должности, сведения о трудовом стаже и трудовой деятельности; профессии); сведения об образовании (в том числе квалификация, ученая степень/звание, образовательное учреждение, год обучения, специальность)</text:p>
          </table:table-cell>
          <table:table-cell table:style-name="Таблица3.A2" office:value-type="string">
            <text:p text:style-name="Table_20_Contents">До достижения цели <text:soft-page-break/>обработки</text:p>
          </table:table-cell>
          <table:table-cell table:style-name="Таблица3.F2" office:value-type="string">
            <text:p text:style-name="Table_20_Contents">По достижении указанных <text:soft-page-break/>сроков обработки персональные данные уничтожаются путем удаления из информационных систем ИП с помощью встроенных средств информационной системы. Персональные данные на бумажных носителях уничтожаются путем измельчения на мелкие части, исключающие возможность последующего восстановления информации. Измельчение осуществляется с использованием шредера (уничтожителя документов); Уничтожение персональных данных, содержащихся на машиночитаемых носителях, осуществляется путем нанесения им неустранимого физического повреждения, исключающего возможность их использования, а также восстановления данных. Вышеуказанное достигается путем деформирования, нарушения единой целостности носителя</text:p>
          </table:table-cell>
        </table:table-row>
        <table:table-row>
          <table:table-cell table:style-name="Таблица3.A2" table:number-rows-spanned="3" office:value-type="string">
            <text:p text:style-name="P5">4. Подготовка, заключение и исполнение гражданско-правового договора</text:p>
          </table:table-cell>
          <table:table-cell table:style-name="Таблица3.A2" office:value-type="string">
            <text:p text:style-name="Table_20_Contents">Контрагенты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ИО; пол, данные документа, удостоверяющего личность; данные документа, подтверждающего право иностранного гражданина или лица без гражданства на пребывание (проживание) на территории РФ, год, месяц, число и место рождения; гражданство, адрес, социальное, имущественное положение, контактные данные (номер телефона, адрес электронной почты), статус резидента, номер расчетного счета, ИНН, СНИЛС, фотовидеоизображение, голос</text:p>
          </table:table-cell>
          <table:table-cell table:style-name="Таблица3.A2" office:value-type="string">
            <text:p text:style-name="Table_20_Contents">В течение 5 лет после прекращения договорных обязательств. В случае если с субъектом ПДн не было установлено договорных отношений, то хранение персональных данных осуществляется до достижения цели обработки или до отзыва согласия в зависимости от того, что произойдет раньше.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уничтожаются путем удаления из информационных систем ИП с помощью встроенных средств информационной системы. Персональные данные на бумажных носителях уничтожаются путем измельчения на мелкие части, исключающие возможность последующего восстановления информации. Измельчение осуществляется с использованием шредера (уничтожителя документов); Уничтожение персональных данных, содержащихся на машиночитаемых носителях, осуществляется путем нанесения им неустранимого физического повреждения, исключающего возможность их использования, а также восстановления данных. Вышеуказанное достигается путем деформирования, нарушения единой <text:soft-page-break/>целостности носителя</text:p>
          </table:table-cell>
        </table:table-row>
        <table:table-row>
          <table:covered-table-cell/>
          <table:table-cell table:style-name="Таблица3.A2" office:value-type="string">
            <text:p text:style-name="Table_20_Contents">Клиенты/контрагенты, планирующие заключить с ИП гражданско-правовой договор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ИО; пол, данные документа, удостоверяющего личность; данные документа, подтверждающего право иностранного гражданина или лица без гражданства на пребывание (проживание) на территории РФ, год, месяц, число и место рождения; гражданство, адрес, социальное, имущественное положение, контактные данные (номер телефона, адрес электронной почты), статус резидента, номер расчетного счета, ИНН, СНИЛС, фото- видеоизображение, голос</text:p>
          </table:table-cell>
          <table:table-cell table:style-name="Таблица3.A2" office:value-type="string">
            <text:p text:style-name="Table_20_Contents">В течение 5 лет после прекращения договорных обязательств. В случае если с субъектом персональны х данных не было установлено договорных отношений, то хранение персональны х данных осуществляет ся до достижения цели обработки или до отзыва согласия в зависимости от того, что произойдет раньше.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уничтожаются путем удаления из информационных систем ИП с помощью встроенных средств информационной системы. Персональные данные на бумажных носителях уничтожаются путем измельчения на мелкие части, исключающие возможность последующего восстановления информации. Измельчение осуществляется с использованием шредера (уничтожителя документов); Уничтожение персональных данных, содержащихся на машиночитаемых носителях, осуществляется путем нанесения им неустранимого физического повреждения, исключающего возможность их использования, а также восстановления данных. Вышеуказанное достигается <text:soft-page-break/>путем деформирования, нарушения единой целостности носителя</text:p>
          </table:table-cell>
        </table:table-row>
        <table:table-row>
          <table:covered-table-cell/>
          <table:table-cell table:style-name="Таблица3.A2" office:value-type="string">
            <text:p text:style-name="Table_20_Contents">Клиенты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ИО; пол, данные документа, удостоверяющего личность; данные документа, подтверждающего право иностранного гражданина или лица без гражданства на пребывание (проживание) на территории РФ, год, месяц, число и место рождения; гражданство, адрес, социальное, имущественное положение, контактные данные (номер телефона, адрес электронной почты), статус резидента, номер расчетного счета, ИНН, СНИЛС, фото- видеоизображение, голос</text:p>
          </table:table-cell>
          <table:table-cell table:style-name="Таблица3.A2" office:value-type="string">
            <text:p text:style-name="Table_20_Contents">В течение 5 лет после прекращения договорных обязательств. В случае если с субъектом персональных данных не было установлено договорных отношений, то хранение персональных данных осуществляется до достижения цели обработки или до отзыва согласия в зависимости от того, что произойдет раньше.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уничтожаются путем удаления из информационных систем ИП с помощью встроенных средств информационной системы. Персональные данные на бумажных носителях уничтожаются путем измельчения на мелкие части, исключающие возможность последующего восстановления информации. Измельчение осуществляется с использованием шредера (уничтожителя документов); Уничтожение персональных данных, содержащихся на машиночитаемых носителях, осуществляется путем нанесения им неустранимого физического повреждения, исключающего возможность их использования, а также <text:soft-page-break/>восстановления данных. Вышеуказанное достигается путем деформирования, нарушения единой целостности носителя</text:p>
          </table:table-cell>
        </table:table-row>
        <table:table-row>
          <table:table-cell table:style-name="Таблица3.A2" table:number-rows-spanned="2" office:value-type="string">
            <text:p text:style-name="P5">5. Продвижение на рынке товаров, работ, услуг ИП путем осуществления прямых контактов с потенциальным потребителем с помощью средств связи</text:p>
          </table:table-cell>
          <table:table-cell table:style-name="Таблица3.A2" office:value-type="string">
            <text:p text:style-name="Table_20_Contents">Клиенты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ИО; дата рождения; контактные данные (адрес электронной почты; номер телефона)</text:p>
          </table:table-cell>
          <table:table-cell table:style-name="Таблица3.A2" office:value-type="string">
            <text:p text:style-name="Table_20_Contents">До достижения цели обработки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уничтожаются путем удаления из информационных систем ИП с помощью встроенных средств информационной системы</text:p>
          </table:table-cell>
        </table:table-row>
        <table:table-row>
          <table:covered-table-cell/>
          <table:table-cell table:style-name="Таблица3.A2" office:value-type="string">
            <text:p text:style-name="Table_20_Contents">Посетители сайта ИП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ИО; дата рождения; контактные данные (адрес электронной почты; номер телефона)</text:p>
          </table:table-cell>
          <table:table-cell table:style-name="Таблица3.A2" office:value-type="string">
            <text:p text:style-name="Table_20_Contents">До достижения цели обработки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уничтожаются путем удаления из информационных систем ИП с помощью встроенных средств информационной системы</text:p>
          </table:table-cell>
        </table:table-row>
        <table:table-row>
          <table:table-cell table:style-name="Таблица3.A2" table:number-rows-spanned="2" office:value-type="string">
            <text:p text:style-name="P5">6. Повышение и контроль за качеством обслуживания, в статистических целях</text:p>
          </table:table-cell>
          <table:table-cell table:style-name="Таблица3.A2" office:value-type="string">
            <text:p text:style-name="Table_20_Contents">Клиенты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амилия; имя; отчество; дата рождения; контактные данные (адрес электронной почты; номер телефона)</text:p>
          </table:table-cell>
          <table:table-cell table:style-name="Таблица3.A2" office:value-type="string">
            <text:p text:style-name="Table_20_Contents">В течение действия заключенного договора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уничтожаются путем удаления из информационных систем ИП с помощью встроенных средств информационной системы</text:p>
          </table:table-cell>
        </table:table-row>
        <table:table-row>
          <table:covered-table-cell/>
          <table:table-cell table:style-name="Таблица3.A2" office:value-type="string">
            <text:p text:style-name="Table_20_Contents">Контрагенты</text:p>
          </table:table-cell>
          <table:table-cell table:style-name="Таблица3.A2" office:value-type="string">
            <text:p text:style-name="Table_20_Contents">Не относятся к специальным категориям <text:soft-page-break/>или биометрическим в 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амилия; имя; отчество; дата рождения; контактные <text:soft-page-break/>данные (адрес электронной почты; номер телефона)</text:p>
          </table:table-cell>
          <table:table-cell table:style-name="Таблица3.A2" office:value-type="string">
            <text:p text:style-name="Table_20_Contents">В течение действия заключенного договора</text:p>
          </table:table-cell>
          <table:table-cell table:style-name="Таблица3.F2" office:value-type="string">
            <text:p text:style-name="Table_20_Contents">По достижении указанных сроков обработки <text:soft-page-break/>персональные данные уничтожаются путем удаления из информационных систем ИП с помощью встроенных средств информационной системы</text:p>
          </table:table-cell>
        </table:table-row>
        <table:table-row>
          <table:table-cell table:style-name="Таблица3.A2" table:number-rows-spanned="2" office:value-type="string">
            <text:p text:style-name="P5">7. Организация учета работников ИП для обеспечения соблюдения законов и иных нормативных правовых актов, обеспечение очередности предоставления отпусков, расчета размера заработной платы, организация контроля количества и качества выполняемой работы, обеспечение пропускного режима ИП, обеспечения личной безопасности работников и сохранности имущества</text:p>
          </table:table-cell>
          <table:table-cell table:style-name="Таблица3.A2" office:value-type="string">
            <text:p text:style-name="Table_20_Contents">Работники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ИО (включая прежние), дате и месте рождения, гражданстве и статусе резидента, поле, основном документе, удостоверяющем личность (сведения о его номере, дате выдачи, выдавшем его органе), о заграничном паспорте (дате выдаче, сроке действия, номере), адресе регистрации и проживания, контактных данных (номер телефона, адрес электронной почты), ИНН, СНИЛС, о воинском учете, сведения документов, подтверждающих право на льготы, в том числе сведения о инвалидности, о нетрудоспособности, о семейном, социальном, имущественном положении, о близких родственниках (ФИО, степень родства, номер телефона), образовании и профессии, <text:soft-page-break/>профессиональной переподготовке, повышении квалификации, знании иностранных языков (каких и степень), данных о трудовой деятельности, в том числе содержащихся в трудовой книжке, доходах, наличии иностранной визы, водительских прав и их категории, мои фото- и видеоизображения, сведения о привлечении к уголовной или административной ответственности (без справки о судимости), сведения о транспортном средстве</text:p>
          </table:table-cell>
          <table:table-cell table:style-name="Таблица3.A2" office:value-type="string">
            <text:p text:style-name="Table_20_Contents">В течение 50 лет с даты прекращения трудовых отношений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уничтожаются путем удаления из информационных систем ИП с помощью встроенных средств информационной системы. Персональные данные на бумажных носителях уничтожаются путем измельчения на мелкие части, исключающие возможность последующего восстановления информации. Измельчение осуществляется с использованием шредера (уничтожителя документов); Уничтожение персональных данных, содержащихся на машиночитаемых носителях, осуществляется путем нанесения им неустранимого физического <text:soft-page-break/>повреждения, исключающего возможность их использования, а также восстановления данных. Вышеуказанное достигается путем деформирования, нарушения единой целостности носителя</text:p>
          </table:table-cell>
        </table:table-row>
        <table:table-row>
          <table:covered-table-cell/>
          <table:table-cell table:style-name="Таблица3.A2" office:value-type="string">
            <text:p text:style-name="Table_20_Contents">Бывшие работники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ИО (включая прежние), дате и месте рождения, гражданстве и статусе резидента, поле, основном документе, удостоверяющем личность (сведения о его номере, дате выдачи, выдавшем его органе), о заграничном паспорте (дате выдаче, сроке действия, номере), адресе регистрации и проживания, контактных данных (номер телефона, адрес электронной почты), <text:soft-page-break/>ИНН, СНИЛС, о воинском учете, сведения документов, подтверждающих право на льготы, в том числе сведения о инвалидности, о нетрудоспособности, о семейном, социальном, имущественном положении, о близких родственниках (ФИО, степень родства, номер телефона), образовании и профессии, профессиональной переподготовке, повышении квалификации, знании иностранных языков (каких и степень), данных о трудовой деятельности, в том числе содержащихся в трудовой книжке, доходах, наличии иностранной визы, водительских прав и их категории, мои фото- и видеоизображения, сведения о привлечении к уголовной или административной ответственности (без справки о судимости), сведения о транспортном средстве</text:p>
          </table:table-cell>
          <table:table-cell table:style-name="Таблица3.A2" office:value-type="string">
            <text:p text:style-name="Table_20_Contents">В течение 50 лет с даты прекращения трудовых отношений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уничтожаются путем удаления из информационных систем ИП с помощью встроенных средств информационной системы. Персональные данные на бумажных носителях уничтожаются путем измельчения на мелкие части, исключающие возможность последующего <text:soft-page-break/>восстановления информации. Измельчение осуществляется с использованием шредера (уничтожителя документов); Уничтожение персональных данных, содержащихся на машиночитаемых носителях, осуществляется путем нанесения им неустранимого физического повреждения, исключающего возможность их использования, а также восстановления данных. Вышеуказанное достигается путем деформирования, нарушения единой целостности носителя</text:p>
          </table:table-cell>
        </table:table-row>
        <table:table-row>
          <table:table-cell table:style-name="Таблица3.A2" office:value-type="string">
            <text:p text:style-name="Table_20_Contents">8. Предоставление услуг работнику (содействие работникам ИП в <text:soft-page-break/>оформлении и использовании различных форм страхования, осуществлении бронирования номеров в отелях, гостиницах, оформлении проездных билетов, обучение и предоставлении сопутствующих услуг работникам ИП)</text:p>
          </table:table-cell>
          <table:table-cell table:style-name="Таблица3.A2" office:value-type="string">
            <text:p text:style-name="Table_20_Contents">Работники</text:p>
          </table:table-cell>
          <table:table-cell table:style-name="Таблица3.A2" office:value-type="string">
            <text:p text:style-name="Table_20_Contents">Не относятся к специальным категориям или биометрическим в <text:soft-page-break/>соответствии со ст. 10– 11 152-ФЗ и обрабатываются автоматизированным способом и без использования средств автоматизации</text:p>
          </table:table-cell>
          <table:table-cell table:style-name="Таблица3.A2" office:value-type="string">
            <text:p text:style-name="Table_20_Contents">ФИО; фотография, год рождения; месяц рождения; дата рождения; место <text:soft-page-break/>рождения; семейное положение; социальное положение; имущественное положение; пол; адрес электронной почты; адрес места жительства; адрес регистрации; номер телефона; СНИЛС; ИНН; гражданство; данные документа, удостоверяющего личность; данные водительского удостоверения; данные документа, удостоверяющего личность за пределами Российской Федерации; реквизиты банковской карты; профессия; должность; сведения о трудовой деятельности (в том числе стаж работы, данные о трудовой занятости на текущее время с указанием наименования и расчетного счета организации); отношение к воинской обязанности, сведения о воинском учете</text:p>
          </table:table-cell>
          <table:table-cell table:style-name="Таблица3.A2" office:value-type="string">
            <text:p text:style-name="Table_20_Contents">В течение 50 лет с даты прекращения трудовых отношений</text:p>
          </table:table-cell>
          <table:table-cell table:style-name="Таблица3.F2" office:value-type="string">
            <text:p text:style-name="Table_20_Contents">По достижении указанных сроков обработки персональные данные <text:soft-page-break/>уничтожаются путем удаления из информационных систем ИП с помощью встроенных средств информационной системы. Персональные данные на бумажных носителях уничтожаются путем измельчения на мелкие части, исключающие возможность последующего восстановления информации. Измельчение осуществляется с использованием шредера (уничтожителя документов); Уничтожение персональных данных, содержащихся на машиночитаемых носителях, осуществляется путем нанесения им неустранимого физического повреждения, исключающего возможность их использования, а также восстановления данных. Вышеуказанное достигается путем деформирования, нарушения единой целостности носителя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14in" fo:page-height="8.3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  <meta:creation-date>2025-06-19T12:15:00Z</meta:creation-date>
    <dc:date>2026-07-09T13:42:05.136000000</dc:date>
    <meta:print-date>2026-04-16T14:03:00Z</meta:print-date>
    <meta:editing-cycles>67</meta:editing-cycles>
    <meta:editing-duration>PT9H36M15S</meta:editing-duration>
    <meta:document-statistic meta:table-count="3" meta:image-count="0" meta:object-count="0" meta:page-count="23" meta:paragraph-count="235" meta:word-count="4741" meta:character-count="39389" meta:non-whitespace-character-count="34895"/>
    <meta:template xlink:type="simple" xlink:actuate="onRequest" xlink:title="" xlink:href="../../../Downloads/Шаблоны%20ИП%20Виленская/politics-datagon.odt/Normal.dotm"/>
  </office:meta>
</office:document-meta>
</file>