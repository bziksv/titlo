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family-generic="system" style:font-charset="x-symbol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Helvetica" svg:font-family="Helvetic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_20_1" style:master-page-name="MP0">
      <style:paragraph-properties fo:text-align="center" style:justify-single-word="false" style:page-number="auto" fo:break-before="pag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T1" style:family="text">
      <style:text-properties style:font-name="Helvetica" style:letter-kerning="false" style:font-name-complex="Helvetica" style:language-complex="ar" style:country-complex="SA"/>
    </style:style>
    <style:style style:name="T2" style:family="text">
      <style:text-properties officeooo:rsid="001a90d2"/>
    </style:style>
    <style:style style:name="T3" style:family="text">
      <style:text-properties fo:language="ru" fo:country="RU" officeooo:rsid="001c9057"/>
    </style:style>
    <style:style style:name="T4" style:family="text">
      <style:text-properties officeooo:rsid="001c9057"/>
    </style:style>
    <style:style style:name="T5" style:family="text">
      <style:text-properties fo:language="en" fo:country="US" officeooo:rsid="001a90d2"/>
    </style:style>
    <style:style style:name="T6" style:family="text">
      <style:text-properties fo:language="en" fo:country="US" officeooo:rsid="001d2a13"/>
    </style:style>
    <style:style style:name="T7" style:family="text">
      <style:text-properties officeooo:rsid="001d2a13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Правила применения рекомендательных технологий <text:span text:style-name="Основной_20_шрифт_20_абзаца"><text:span text:style-name="T1">ИП Виленская Юлия Андреевна</text:span></text:span></text:h>
      <text:p text:style-name="P1"/>
      <text:p text:style-name="Text_20_body">1. ИП Виленская Юлия Андреевна (ИНН: 362903774541, адрес: 394026, Воронежская область, г. Воронеж, Московский проспект д.13/2 офис 175,), далее – ИП, является владельцем сайта <text:a xlink:type="simple" xlink:href="https://titlo.ru/" text:style-name="Internet_20_link" text:visited-style-name="Visited_20_Internet_20_Link">https://titlo.ru/</text:a> («Сайт»).</text:p>
      <text:p text:style-name="Text_20_body">2. Владелец Сайта использует на Сайте рекомендательные технологии.</text:p>
      <text:p text:style-name="Text_20_body">3. Настоящие Правила разработаны в соответствии с п. 2 ч. 1 ст. 10.2-2 Федерального закона от 27.07.2006 № 149-ФЗ «Об информации, информационных технологиях и о защите информации» и содержат описание процессов и методов сбора, систематизации, анализа сведений, относящихся к предпочтениям пользователей сети «Интернет», предоставления информации на основе этих сведений, а также способов осуществления таких процессов и методов, виды сведений, относящихся к предпочтениям пользователей сети "Интернет", которые используются для предоставления информации с применением рекомендательных технологий, источники получения таких сведений.</text:p>
      <text:p text:style-name="Text_20_body">4. Рекомендательные технологии – это информационные технологии предоставления информации на основе сбора, систематизации и анализа сведений, относящихся к предпочтениям пользователей сети «Интернет», находящихся на территории Российской Федерации.</text:p>
      <text:p text:style-name="Text_20_body">5. Виды сведений, относящихся к предпочтениям пользователей сети «Интернет», которые используются для предоставления информации с применением рекомендательных технологий, источники получения таких сведений:</text:p>
      <text:list xml:id="list3847833916" text:style-name="L1">
        <text:list-item>
          <text:p text:style-name="P3">данные о любых действиях пользователя на Сайте (клики, скроллы, переходы, отправки форм заявок, скачивание файлов и тд);</text:p>
        </text:list-item>
        <text:list-item>
          <text:p text:style-name="P3">данные о любых запросах пользователя на Сайте;</text:p>
        </text:list-item>
        <text:list-item>
          <text:p text:style-name="P3">IP-адрес;</text:p>
        </text:list-item>
        <text:list-item>
          <text:p text:style-name="P3">cookie-файлы;</text:p>
        </text:list-item>
        <text:list-item>
          <text:p text:style-name="P3">идентификатор пользователя, присваиваемый метрическими системами;</text:p>
        </text:list-item>
        <text:list-item>
          <text:p text:style-name="P3">посещенные страницы;</text:p>
        </text:list-item>
        <text:list-item>
          <text:p text:style-name="P3">количество посещений страниц;</text:p>
        </text:list-item>
        <text:list-item>
          <text:p text:style-name="P3">информация о перемещении по страницам сайта (в т.ч. запись движения мыши, нажатий на ссылки и элементы сайта);</text:p>
        </text:list-item>
        <text:list-item>
          <text:p text:style-name="P3">длительность пользовательской сессии;</text:p>
        </text:list-item>
        <text:list-item>
          <text:p text:style-name="P3">точки входа (сторонние сайты, с которых пользователь по ссылке переходит на</text:p>
        </text:list-item>
      </text:list>
      <text:p text:style-name="Text_20_body">сайт);</text:p>
      <text:list xml:id="list3505140316" text:style-name="L2">
        <text:list-item>
          <text:p text:style-name="P4"><text:soft-page-break/>точки выхода (ссылки на сайте, по которым пользователь переходит на сторонние</text:p>
        </text:list-item>
      </text:list>
      <text:p text:style-name="Text_20_body">сайты);</text:p>
      <text:list xml:id="list4122323969" text:style-name="L3">
        <text:list-item>
          <text:p text:style-name="P5">страна пользователя; регион пользователя; город пользователя;</text:p>
        </text:list-item>
        <text:list-item>
          <text:p text:style-name="P5">часовой пояс, установленный на устройстве пользователя;</text:p>
        </text:list-item>
        <text:list-item>
          <text:p text:style-name="P5">браузер пользователя;</text:p>
        </text:list-item>
        <text:list-item>
          <text:p text:style-name="P5">ОС пользователя;</text:p>
        </text:list-item>
        <text:list-item>
          <text:p text:style-name="P5">параметры экрана (разрешение, глубина цветности, параметры размещения страницы на экране);</text:p>
        </text:list-item>
        <text:list-item>
          <text:p text:style-name="P5">дата и время посещения сайта;</text:p>
        </text:list-item>
        <text:list-item>
          <text:p text:style-name="P5">источник перехода (UTM метка);</text:p>
        </text:list-item>
        <text:list-item>
          <text:p text:style-name="P5">значение UTM меток от source до content;</text:p>
        </text:list-item>
        <text:list-item>
          <text:p text:style-name="P5">метрические данные;</text:p>
        </text:list-item>
        <text:list-item>
          <text:p text:style-name="P5">данные сетевого трафика.</text:p>
        </text:list-item>
      </text:list>
      <text:p text:style-name="Text_20_body">6. Описание процессов и методов сбора, систематизации, анализа сведений, относящихся к предпочтениям пользователей сети «Интернет», предоставления информации на основе этих сведений, а также способов осуществления таких процессов и методов:</text:p>
      <text:list xml:id="list162132497" text:style-name="L4">
        <text:list-item>
          <text:p text:style-name="P6">для генерации трафика на страницы сайта <text:a xlink:type="simple" xlink:href="https://cabinet.titlo.ru/" text:style-name="Internet_20_link" text:visited-style-name="Visited_20_Internet_20_Link">https://cabinet.titlo.ru/</text:a> а также для отслеживания переходов и действий внутри сайта используются сторонние технологии, такие как:</text:p>
        </text:list-item>
      </text:list>
      <text:list xml:id="list1531925594" text:style-name="L5">
        <text:list-item>
          <text:list>
            <text:list-item>
              <text:p text:style-name="P7"><text:a xlink:type="simple" xlink:href="https://cabinet.titlo.ru/" text:style-name="Internet_20_link" text:visited-style-name="Visited_20_Internet_20_Link">https://cabinet.titlo.ru/</text:a> - <text:span text:style-name="T7">л</text:span><text:span text:style-name="T4">ичный кабинет сайта </text:span><text:a xlink:type="simple" xlink:href="https://titlo.ru/" text:style-name="Internet_20_link" text:visited-style-name="Visited_20_Internet_20_Link"><text:span text:style-name="T4">https://titlo.ru/</text:span></text:a><text:span text:style-name="T5">, </text:span><text:span text:style-name="T3">содержащий набор инструментов </text:span><text:span text:style-name="T2">для SEO-специалистов и маркетологов.</text:span></text:p>
            </text:list-item>
            <text:list-item>
              <text:p text:style-name="P7"><text:a xlink:type="simple" xlink:href="https://unpkg.com/" text:style-name="Internet_20_link" text:visited-style-name="Visited_20_Internet_20_Link">https://unpkg.com/</text:a> - глобальная сеть доставки контента.</text:p>
            </text:list-item>
            <text:list-item>
              <text:p text:style-name="P7"><text:a xlink:type="simple" xlink:href="https://img.youtube.com/" text:style-name="Internet_20_link" text:visited-style-name="Visited_20_Internet_20_Link">https://img.youtube.com/</text:a> - CDN <text:span text:style-name="T6">Youtube.</text:span></text:p>
            </text:list-item>
            <text:list-item>
              <text:p text:style-name="P7"><text:a xlink:type="simple" xlink:href="https://mc.yandex.ru/" text:style-name="Internet_20_link" text:visited-style-name="Visited_20_Internet_20_Link">https://mc.yandex.ru/</text:a> — сервис Яндекс Метрики; используется на сайте titlo.ru и в личном кабинете cabinet.titlo.ru для сбора и анализа статистики посещений, действий пользователей и достижения целей.</text:p>
            </text:list-item>
            <text:list-item>
              <text:p text:style-name="P7"><text:a xlink:type="simple" xlink:href="https://mc.yandex.com/" text:style-name="Internet_20_link" text:visited-style-name="Visited_20_Internet_20_Link">https://mc.yandex.com/</text:a> — международный домен сервиса Яндекс Метрики (зеркало mc.yandex.ru); используется для тех же целей сбора и анализа статистики посещений.</text:p>
            </text:list-item>
            <text:list-item>
              <text:p text:style-name="P7"><text:a xlink:type="simple" xlink:href="https://cdnjs.cloudflare.com/" text:style-name="Internet_20_link" text:visited-style-name="Visited_20_Internet_20_Link">https://cdnjs.cloudflare.com/</text:a> — CDN проекта cdnjs (Cloudflare); используется для подгрузки сторонних библиотек с открытым исходным кодом (в т.ч. JSZip, pdfmake, Font Awesome, CKEditor) на сайте titlo.ru и в личном кабинете cabinet.titlo.ru.</text:p>
            </text:list-item>
            <text:list-item>
              <text:p text:style-name="P7"><text:a xlink:type="simple" xlink:href="https://www.googletagmanager.com/" text:style-name="Internet_20_link" text:visited-style-name="Visited_20_Internet_20_Link">https://www.googletagmanager.com/</text:a> - Google Tag Manager (GTM).</text:p>
            </text:list-item>
          </text:list>
        </text:list-item>
      </text:list>
      <text:p text:style-name="Text_20_body">сведения о действиях пользователей веб-сайта обрабатываются для совершенствования продуктов и услуг ИП, определения предпочтений пользователя, предоставления целевой информации по продуктам и услугам, анализа и настройки рекламы.</text:p>
      <text:p text:style-name="Text_20_body">7. Пользователями этих данных являются сотрудники ИП (маркетологи, аналитики, менеджеры продукта и другие вовлеченные лица), а также СЕО-партнеры - для индексации и ранжирования страниц ИП в поисковых системах, удобства нахождения клиентами нужных страниц (Партнеры используют обезличенные агрегированные данные из Яндекс Метрики, отслеживая число визитов и количество выполненных целевых действий на страницах сайта).</text:p>
      <text:p text:style-name="Text_20_body"><text:soft-page-break/>8. Юридически значимые сообщения по вопросам применения рекомендательных технологий могут быть направлены на адрес электронной почты ИП Виленская Юлия Андреевна: <text:a xlink:type="simple" xlink:href="mailto:info@titlo.ru" text:style-name="Internet_20_link" text:visited-style-name="Visited_20_Internet_20_Link">info@titlo.ru</text:a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family-generic="system" style:font-charset="x-symbol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Helvetica" svg:font-family="Helvetica" style:font-family-generic="system" style:font-pitch="variable"/>
  </office:font-face-decls>
  <office:styles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  <meta:creation-date>2025-06-19T12:15:00Z</meta:creation-date>
    <dc:date>2026-07-09T13:43:26.521000000</dc:date>
    <meta:editing-cycles>28</meta:editing-cycles>
    <meta:editing-duration>PT7H37M22S</meta:editing-duration>
    <meta:document-statistic meta:table-count="0" meta:image-count="0" meta:object-count="0" meta:page-count="3" meta:paragraph-count="38" meta:word-count="498" meta:character-count="3975" meta:non-whitespace-character-count="3539"/>
    <meta:template xlink:type="simple" xlink:actuate="onRequest" xlink:title="" xlink:href="../../../Downloads/Шаблоны%20ИП%20Виленская/rules-recommendation-datagon.odt/Normal.dotm"/>
  </office:meta>
</office:document-meta>
</file>