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fo:color="#181818" fo:background-color="#ffffff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олитика использования cookie-файлов <text:span text:style-name="Основной_20_шрифт_20_абзаца"><text:span text:style-name="T1">ИП Виленская Юлия Андреевна</text:span></text:span></text:h>
      <text:h text:style-name="Heading_20_2" text:outline-level="2">1. Общие положения</text:h>
      <text:p text:style-name="Text_20_body"><text:span text:style-name="Основной_20_шрифт_20_абзаца"><text:span text:style-name="T2">ИП Виленская Юлия Андреевна </text:span></text:span>(далее – мы, наш, наши, нас, нам), адрес: 394026, Воронежская область, г. Воронеж, Московский проспект д.13/2 офис 175, придаёт большое значение защите Вашей частной жизни и безопасности Ваших персональных данных.</text:p>
      <text:p text:style-name="Text_20_body">Мы соблюдаем требования действующего законодательства Российской Федерации в области персональных данных. При обработке персональных данных мы придерживаемся принципов, изложенных в ст. 5 Федерального закона от 27.07.2006 г. № 152-ФЗ «О персональных данных».</text:p>
      <text:p text:style-name="Text_20_body">ИП обрабатывает данные, указанные в настоящем документе (далее — Политика), собранные в процессе использования Вами нашего веб-сайта: <text:a xlink:type="simple" xlink:href="https://titlo.ru/" text:style-name="Internet_20_link" text:visited-style-name="Visited_20_Internet_20_Link">https://titlo.ru/</text:a>.</text:p>
      <text:p text:style-name="Text_20_body">Продолжая использовать веб-сайт без внесения изменений в настройки правил обработки cookie-файлов, Вы предоставляете согласие на обработку cookie-файлов. Вы также можете отказаться от обработки cookie-файлов в соответствии с разделом 4 Политики.</text:p>
      <text:h text:style-name="Heading_20_2" text:outline-level="2">2. Термины</text:h>
      <text:p text:style-name="Text_20_body">Cookie-файлы — это небольшой фрагмент данных, который веб-сайт запрашивает у браузера, используемого на Вашем компьютере или мобильном устройстве. Cookie-файлы содержат информацию о Ваших действиях на веб-сайте, а также могут содержать сведения о Вашем оборудовании, дату и время сессии.</text:p>
      <text:p text:style-name="Text_20_body">Cookie-файлы используются ИП в целях улучшения и обеспечения нормальной работоспособности веб-сайта, а также в целях совершенствования продуктов и услуг ИП и его партнеров – в частности, путем определения Ваших предпочтений для предоставления Вам целевой информации по таким продуктам и услугам.</text:p>
      <text:p text:style-name="Text_20_body">Пользователь может отказаться от использования <text:span text:style-name="Основной_20_шрифт_20_абзаца"><text:span text:style-name="T3">c</text:span></text:span>ookie-файлов, установив соответствующим образом настройки своего браузера, согласно инструкциям, представленным ниже.</text:p>
      <text:p text:style-name="Text_20_body">Блокировка <text:span text:style-name="Основной_20_шрифт_20_абзаца"><text:span text:style-name="T3">c</text:span></text:span>ookie-файлов может повлиять на функциональные возможности сайта.</text:p>
      <text:h text:style-name="Heading_20_2" text:outline-level="2">3. Cookie-файлы и автоматическое логирование</text:h>
      <text:p text:style-name="Text_20_body">Cookie-файлы относятся к одной из технологий, которые мы используем для автоматического сбора информации и повышения качества контента. Так же, как и большинство других организаций, занимающихся информационными ресурсами, наши веб-серверы и системы безопасности время от времени хранят некоторые временные технические данные в своих лог-файлах.</text:p>
      <text:p text:style-name="Text_20_body">Собираемые cookie-файлы на нашем сайте:</text:p>
      <text:h text:style-name="Heading_20_3" text:outline-level="3">Сессионные</text:h>
      <text:p text:style-name="Text_20_body">Существуют только во временной памяти в течение времени, когда пользователь находится на странице веб-сайта. Обычно сессионные <text:span text:style-name="Основной_20_шрифт_20_абзаца"><text:span text:style-name="T3">c</text:span></text:span>ookie-файлы удаляют после того, как Вы <text:soft-page-break/>закрываете окно веб-сайта. Сессионные <text:span text:style-name="Основной_20_шрифт_20_абзаца"><text:span text:style-name="T3">c</text:span></text:span>ookie-файлы позволяют помнить информацию о Вашем выборе на предыдущей странице, чтобы избежать необходимости повторного ввода информации.</text:p>
      <text:h text:style-name="Heading_20_3" text:outline-level="3">Постоянные</text:h>
      <text:p text:style-name="Text_20_body"><text:span text:style-name="Основной_20_шрифт_20_абзаца"><text:span text:style-name="T3">Co</text:span></text:span>okie-файлы, которые хранятся на Вашем компьютере или мобильном устройстве и не удаляются при закрытии браузера. Постоянные <text:span text:style-name="Основной_20_шрифт_20_абзаца"><text:span text:style-name="T3">c</text:span></text:span>ookie-файлы могут сохранять пользовательские настройки для определенного веб-сайта, позволяя использовать эти предпочтения в будущих сеансах использования веб-сайта.</text:p>
      <text:p text:style-name="Text_20_body">Такие <text:span text:style-name="Основной_20_шрифт_20_абзаца"><text:span text:style-name="T3">c</text:span></text:span>ookie-файлы позволяют идентифицировать Вас как уникального пользователя и при возвращении на веб-сайт помогают вспомнить информацию о Вас и ранее совершенных Вами действиях.</text:p>
      <text:h text:style-name="Heading_20_3" text:outline-level="3">Аналитические/маркетинговые</text:h>
      <text:p text:style-name="Text_20_body">Включают в себя информацию о том, как Вы используете веб-сайт, например, какие страницы Вы посещаете, по каким ссылкам переходите. Мы используем эти <text:span text:style-name="Основной_20_шрифт_20_абзаца"><text:span text:style-name="T3">c</text:span></text:span>ookie-файлы, в основном для того, чтобы улучшить функционал веб-сайта и Ваш пользовательский опыт при его использовании. Иногда такие <text:span text:style-name="Основной_20_шрифт_20_абзаца"><text:span text:style-name="T3">c</text:span></text:span>ookie-файлы также позволяют нам определить Ваши предпочтения и предоставить Вам полезную целевую информацию по продуктам, услугам и сервисам, которые могут Вас заинтересовать.</text:p>
      <text:h text:style-name="Heading_20_3" text:outline-level="3">Обязательные</text:h>
      <text:p text:style-name="Text_20_body">Это минимальный набор <text:span text:style-name="Основной_20_шрифт_20_абзаца"><text:span text:style-name="T3">c</text:span></text:span>ookie-файлов, использование которых необходимо для обеспечения правильной и бесперебойной работы веб-сайта.</text:p>
      <text:h text:style-name="Heading_20_2" text:outline-level="2">4. Как отказаться от обработки cookie-файлов</text:h>
      <text:p text:style-name="Text_20_body">Cookie-файлы устанавливаются в браузер на Вашем устройстве – в большинстве случаев это происходит автоматически. Вы можете отказаться от сохранения и использования cookie-файлов на своем устройстве или удалить уже сохраненные <text:span text:style-name="Основной_20_шрифт_20_абзаца"><text:span text:style-name="T3">c</text:span></text:span>ookies в настройках Вашего браузера.</text:p>
      <text:p text:style-name="Text_20_body">В том случае, если Вы откажетесь от обработки cookie-файлов, наш веб-сайт будет использовать только обязательные cookie-файлы.</text:p>
      <text:h text:style-name="Heading_20_2" text:outline-level="2">5. Безопасность данных</text:h>
      <text:p text:style-name="Text_20_body">Персональные данные, которые мы собираем и храним, считаются конфиденциальной информацией. Они защищены от потери, изменения или несанкционированного доступа согласно действующему законодательству Российской Федерации в области персональных данных. Для этого ИП применяет технические средства и организационные меры в соответствии со ст. 18, 18.1, 19 Федерального закона от 27.07.2006 № 152-ФЗ «О персональных данных».</text:p>
      <text:p text:style-name="Text_20_body">ИП постоянно совершенствует системы защиты данных.</text:p>
      <text:h text:style-name="Heading_20_2" text:outline-level="2"><text:soft-page-break/>6. Изменение политики</text:h>
      <text:p text:style-name="Text_20_body"><text:span text:style-name="Основной_20_шрифт_20_абзаца"><text:span text:style-name="T2">ИП Виленская Юлия Андреевна </text:span></text:span>развивается и поэтому отдельные бизнес-процессы могут изменяться. В силу этого мы будем вынуждены актуализировать Политику и вносить в нее изменения. Мы просим Вас регулярно просматривать все обновления нашей Политики.</text:p>
      <text:p text:style-name="Text_20_body">По вопросам, связанным с обработкой и защитой персональных данных, Вы можете обратиться по адресу электронной почты: <text:a xlink:type="simple" xlink:href="mailto:info@titlo.ru" text:style-name="Internet_20_link" text:visited-style-name="Visited_20_Internet_20_Link">info@titlo.ru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  <meta:creation-date>2025-06-19T12:15:00Z</meta:creation-date>
    <dc:date>2026-07-09T13:39:41.254000000</dc:date>
    <meta:editing-cycles>24</meta:editing-cycles>
    <meta:editing-duration>PT7H17M30S</meta:editing-duration>
    <meta:document-statistic meta:table-count="0" meta:image-count="0" meta:object-count="0" meta:page-count="3" meta:paragraph-count="32" meta:word-count="624" meta:character-count="5022" meta:non-whitespace-character-count="4425"/>
    <meta:template xlink:type="simple" xlink:actuate="onRequest" xlink:title="" xlink:href="../../../Downloads/Шаблоны%20ИП%20Виленская/cookies-datagon.odt/Normal.dotm"/>
  </office:meta>
</office:document-meta>
</file>